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die richtig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i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Bravo. 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Sprich direkt in das Mikrofon. Wenn du fertig bist, nimm deine Spielfigur vom Spielfeld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einen der Spiel-Steine. Um ein Spiel zu beenden, verwende den Ende-Funktions-Chip. Um Hoorch auszuschalten drücke 3 Sekunden auf den EIN-AUS-Knopf oder leg die Chips ENDE und JA gleichzeitig auf zwei Spiel-Felder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künd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Funktions-Chip. Zum Verwerfen den Nein-Funktions-Chip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se Geschichte löschen willst, nimm deine Figur vom Spielfeld und leg den Ja-Funktions-Chip hin. Wenn die Geschichte nicht gelöscht werden soll, leg den Nein-Chip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t den Fragezeichen-Chip auf ein Spielfeld. Wenn ihr sie in einem Spiel erraten wollt, stellt eure Spielfiguren auf die Spielfelder.</text:p>
          </table:table-cell>
          <table:table-cell office:value-type="string" calcext:value-type="string">
            <text:p>Wenn ihr die Tiernamen auf Englisch lernen wollt, lege den Fragezeichen-Chip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von Tieren vor. Wenn du das Tier weisst, tausche deine Spielfigur gegen die passend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 eine Pause. Zum Weiterspielen nimm den Pause-Chip wieder vom Spielfeld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EXT([.A270];&quot;000&quot;) &amp; &quot;.mp3&quot;" office:value-type="string" office:string-value="269.mp3" calcext:value-type="string">
            <text:p>269.mp3</text:p>
          </table:table-cell>
          <table:table-cell table:number-columns-repeated="2" office:value-type="string" calcext:value-type="string">
            <text:p>Reader auf Spielfeld eins ist defek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EXT([.A271];&quot;000&quot;) &amp; &quot;.mp3&quot;" office:value-type="string" office:string-value="270.mp3" calcext:value-type="string">
            <text:p>270.mp3</text:p>
          </table:table-cell>
          <table:table-cell table:number-columns-repeated="2" office:value-type="string" calcext:value-type="string">
            <text:p>Reader auf Spielfeld zwei ist defek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EXT([.A272];&quot;000&quot;) &amp; &quot;.mp3&quot;" office:value-type="string" office:string-value="271.mp3" calcext:value-type="string">
            <text:p>271.mp3</text:p>
          </table:table-cell>
          <table:table-cell table:number-columns-repeated="2" office:value-type="string" calcext:value-type="string">
            <text:p>Reader auf Spielfeld drei ist defek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EXT([.A273];&quot;000&quot;) &amp; &quot;.mp3&quot;" office:value-type="string" office:string-value="272.mp3" calcext:value-type="string">
            <text:p>272.mp3</text:p>
          </table:table-cell>
          <table:table-cell table:number-columns-repeated="2" office:value-type="string" calcext:value-type="string">
            <text:p>Reader auf Spielfeld vier ist defek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EXT([.A274];&quot;000&quot;) &amp; &quot;.mp3&quot;" office:value-type="string" office:string-value="273.mp3" calcext:value-type="string">
            <text:p>273.mp3</text:p>
          </table:table-cell>
          <table:table-cell table:number-columns-repeated="2" office:value-type="string" calcext:value-type="string">
            <text:p>Reader auf Spielfeld fünf ist defek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EXT([.A275];&quot;000&quot;) &amp; &quot;.mp3&quot;" office:value-type="string" office:string-value="274.mp3" calcext:value-type="string">
            <text:p>274.mp3</text:p>
          </table:table-cell>
          <table:table-cell table:number-columns-repeated="2" office:value-type="string" calcext:value-type="string">
            <text:p>Reader auf Spielfeld sechs ist defek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TEXT([.A276];&quot;000&quot;) &amp; &quot;.mp3&quot;" office:value-type="string" office:string-value="275.mp3" calcext:value-type="string">
            <text:p>275.mp3</text:p>
          </table:table-cell>
          <table:table-cell table:number-columns-repeated="2" office:value-type="string" calcext:value-type="string">
            <text:p>Hallo Hallo – bist du noch da? Welches Spiel wollt ihr spielen?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TEXT([.A277];&quot;000&quot;) &amp; &quot;.mp3&quot;" office:value-type="string" office:string-value="276.mp3" calcext:value-type="string">
            <text:p>276.mp3</text:p>
          </table:table-cell>
          <table:table-cell table:number-columns-repeated="2" office:value-type="string" calcext:value-type="string">
            <text:p>Sie befinden sich im Admin-Menü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TEXT([.A278];&quot;000&quot;) &amp; &quot;.mp3&quot;" office:value-type="string" office:string-value="277.mp3" calcext:value-type="string">
            <text:p>277.mp3</text:p>
          </table:table-cell>
          <table:table-cell table:number-columns-repeated="2" office:value-type="string" calcext:value-type="string">
            <text:p>Es ist ein Update verfügba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TEXT([.A279];&quot;000&quot;) &amp; &quot;.mp3&quot;" office:value-type="string" office:string-value="278.mp3" calcext:value-type="string">
            <text:p>278.mp3</text:p>
          </table:table-cell>
          <table:table-cell table:number-columns-repeated="2" office:value-type="string" calcext:value-type="string">
            <text:p>1 - Software aktualisier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TEXT([.A280];&quot;000&quot;) &amp; &quot;.mp3&quot;" office:value-type="string" office:string-value="279.mp3" calcext:value-type="string">
            <text:p>279.mp3</text:p>
          </table:table-cell>
          <table:table-cell table:number-columns-repeated="2" office:value-type="string" calcext:value-type="string">
            <text:p>2 – WiFi-Konfigurati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TEXT([.A281];&quot;000&quot;) &amp; &quot;.mp3&quot;" office:value-type="string" office:string-value="280.mp3" calcext:value-type="string">
            <text:p>280.mp3</text:p>
          </table:table-cell>
          <table:table-cell table:number-columns-repeated="2" office:value-type="string" calcext:value-type="string">
            <text:p>3 - Spielfiguren-Set lösch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TEXT([.A282];&quot;000&quot;) &amp; &quot;.mp3&quot;" office:value-type="string" office:string-value="281.mp3" calcext:value-type="string">
            <text:p>281.mp3</text:p>
          </table:table-cell>
          <table:table-cell table:number-columns-repeated="2" office:value-type="string" calcext:value-type="string">
            <text:p>4 - Alle Geschichten archivier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TEXT([.A283];&quot;000&quot;) &amp; &quot;.mp3&quot;" office:value-type="string" office:string-value="282.mp3" calcext:value-type="string">
            <text:p>282.mp3</text:p>
          </table:table-cell>
          <table:table-cell table:number-columns-repeated="2" office:value-type="string" calcext:value-type="string">
            <text:p>5 – Geschwindigkeit norm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TEXT([.A284];&quot;000&quot;) &amp; &quot;.mp3&quot;" office:value-type="string" office:string-value="283.mp3" calcext:value-type="string">
            <text:p>283.mp3</text:p>
          </table:table-cell>
          <table:table-cell table:number-columns-repeated="2" office:value-type="string" calcext:value-type="string">
            <text:p>6 – Geschwindigkeit langsa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TEXT([.A285];&quot;000&quot;) &amp; &quot;.mp3&quot;" office:value-type="string" office:string-value="284.mp3" calcext:value-type="string">
            <text:p>284.mp3</text:p>
          </table:table-cell>
          <table:table-cell table:number-columns-repeated="2" office:value-type="string" calcext:value-type="string">
            <text:p>7 – Geschwindigkeit schne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TEXT([.A286];&quot;000&quot;) &amp; &quot;.mp3&quot;" office:value-type="string" office:string-value="285.mp3" calcext:value-type="string">
            <text:p>285.mp3</text:p>
          </table:table-cell>
          <table:table-cell table:number-columns-repeated="2" office:value-type="string" calcext:value-type="string">
            <text:p>Admin-Menü beende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TEXT([.A287];&quot;000&quot;) &amp; &quot;.mp3&quot;" office:value-type="string" office:string-value="286.mp3" calcext:value-type="string">
            <text:p>286.mp3</text:p>
          </table:table-cell>
          <table:table-cell table:number-columns-repeated="2" office:value-type="string" calcext:value-type="string">
            <text:p>Ende-Täg zum Beende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TEXT([.A288];&quot;000&quot;) &amp; &quot;.mp3&quot;" office:value-type="string" office:string-value="287.mp3" calcext:value-type="string">
            <text:p>287.mp3</text:p>
          </table:table-cell>
          <table:table-cell table:number-columns-repeated="2" office:value-type="string" calcext:value-type="string">
            <text:p>Alle Geschichten wurden archivier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TEXT([.A289];&quot;000&quot;) &amp; &quot;.mp3&quot;" office:value-type="string" office:string-value="288.mp3" calcext:value-type="string">
            <text:p>288.mp3</text:p>
          </table:table-cell>
          <table:table-cell table:number-columns-repeated="2" office:value-type="string" calcext:value-type="string">
            <text:p>Figuren-Datenbank gelöscht. Ich starte jetzt neu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TEXT([.A290];&quot;000&quot;) &amp; &quot;.mp3&quot;" office:value-type="string" office:string-value="289.mp3" calcext:value-type="string">
            <text:p>289.mp3</text:p>
          </table:table-cell>
          <table:table-cell table:number-columns-repeated="2" office:value-type="string" calcext:value-type="string">
            <text:p>Wifi nicht verbunde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TEXT([.A291];&quot;000&quot;) &amp; &quot;.mp3&quot;" office:value-type="string" office:string-value="290.mp3" calcext:value-type="string">
            <text:p>290.mp3</text:p>
          </table:table-cell>
          <table:table-cell table:number-columns-repeated="2" office:value-type="string" calcext:value-type="string">
            <text:p>Öffne zuerst mit der Zahlenkarte 1 die WiFi Konfiguratio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TEXT([.A292];&quot;000&quot;) &amp; &quot;.mp3&quot;" office:value-type="string" office:string-value="291.mp3" calcext:value-type="string">
            <text:p>291.mp3</text:p>
          </table:table-cell>
          <table:table-cell table:number-columns-repeated="2" office:value-type="string" calcext:value-type="string">
            <text:p>Aktualisierung wird gestartet. Dies kann einige Minuten dauern. Hoorch startet anschließend neu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TEXT([.A293];&quot;000&quot;) &amp; &quot;.mp3&quot;" office:value-type="string" office:string-value="292.mp3" calcext:value-type="string">
            <text:p>292.mp3</text:p>
          </table:table-cell>
          <table:table-cell table:number-columns-repeated="2" office:value-type="string" calcext:value-type="string">
            <text:p>Aktualisierung beendet. Ich starte jetzt neu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TEXT([.A294];&quot;000&quot;) &amp; &quot;.mp3&quot;" office:value-type="string" office:string-value="293.mp3" calcext:value-type="string">
            <text:p>293.mp3</text:p>
          </table:table-cell>
          <table:table-cell table:number-columns-repeated="2" office:value-type="string" calcext:value-type="string">
            <text:p>Wifi ist ausgeschalte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TEXT([.A295];&quot;000&quot;) &amp; &quot;.mp3&quot;" office:value-type="string" office:string-value="294.mp3" calcext:value-type="string">
            <text:p>294.mp3</text:p>
          </table:table-cell>
          <table:table-cell table:number-columns-repeated="2" office:value-type="string" calcext:value-type="string">
            <text:p>Die IP-Adresse laut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1:17:45.66421149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6-05-11T12:31:20.229451719</dc:date>
    <meta:editing-duration>PT3H37M49S</meta:editing-duration>
    <meta:editing-cycles>39</meta:editing-cycles>
    <meta:generator>LibreOffice/26.2.3.2$Linux_X86_64 LibreOffice_project/620$Build-2</meta:generator>
    <meta:document-statistic meta:table-count="1" meta:cell-count="1180" meta:object-count="0"/>
    <meta:user-defined meta:name="ProgId">Excel.Sheet</meta:user-defined>
  </office:meta>
</office:document-meta>
</file>