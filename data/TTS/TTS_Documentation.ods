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148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EXT([.A277];&quot;000&quot;) &amp; &quot;.mp3&quot;" office:value-type="string" office:string-value="276.mp3" calcext:value-type="string">
            <text:p>276.mp3</text:p>
          </table:table-cell>
          <table:table-cell table:number-columns-repeated="2" office:value-type="string" calcext:value-type="string">
            <text:p>Sie befinden sich im Admin-Men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EXT([.A278];&quot;000&quot;) &amp; &quot;.mp3&quot;" office:value-type="string" office:string-value="277.mp3" calcext:value-type="string">
            <text:p>277.mp3</text:p>
          </table:table-cell>
          <table:table-cell table:number-columns-repeated="2" office:value-type="string" calcext:value-type="string">
            <text:p>Es ist ein Update verfügba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EXT([.A279];&quot;000&quot;) &amp; &quot;.mp3&quot;" office:value-type="string" office:string-value="278.mp3" calcext:value-type="string">
            <text:p>278.mp3</text:p>
          </table:table-cell>
          <table:table-cell table:number-columns-repeated="2" office:value-type="string" calcext:value-type="string">
            <text:p>1 - Software aktualisier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EXT([.A280];&quot;000&quot;) &amp; &quot;.mp3&quot;" office:value-type="string" office:string-value="279.mp3" calcext:value-type="string">
            <text:p>279.mp3</text:p>
          </table:table-cell>
          <table:table-cell table:number-columns-repeated="2" office:value-type="string" calcext:value-type="string">
            <text:p>2 – WiFi-Konfigurati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EXT([.A281];&quot;000&quot;) &amp; &quot;.mp3&quot;" office:value-type="string" office:string-value="280.mp3" calcext:value-type="string">
            <text:p>280.mp3</text:p>
          </table:table-cell>
          <table:table-cell table:number-columns-repeated="2" office:value-type="string" calcext:value-type="string">
            <text:p>3 - Spielfiguren-Set lösch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EXT([.A282];&quot;000&quot;) &amp; &quot;.mp3&quot;" office:value-type="string" office:string-value="281.mp3" calcext:value-type="string">
            <text:p>281.mp3</text:p>
          </table:table-cell>
          <table:table-cell table:number-columns-repeated="2" office:value-type="string" calcext:value-type="string">
            <text:p>4 - Alle Geschichten archivier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EXT([.A283];&quot;000&quot;) &amp; &quot;.mp3&quot;" office:value-type="string" office:string-value="282.mp3" calcext:value-type="string">
            <text:p>282.mp3</text:p>
          </table:table-cell>
          <table:table-cell table:number-columns-repeated="2" office:value-type="string" calcext:value-type="string">
            <text:p>5 – Geschwindigkeit mitte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EXT([.A284];&quot;000&quot;) &amp; &quot;.mp3&quot;" office:value-type="string" office:string-value="283.mp3" calcext:value-type="string">
            <text:p>283.mp3</text:p>
          </table:table-cell>
          <table:table-cell table:number-columns-repeated="2" office:value-type="string" calcext:value-type="string">
            <text:p>6 – Geschwindigkeit langs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EXT([.A285];&quot;000&quot;) &amp; &quot;.mp3&quot;" office:value-type="string" office:string-value="284.mp3" calcext:value-type="string">
            <text:p>284.mp3</text:p>
          </table:table-cell>
          <table:table-cell table:number-columns-repeated="2" office:value-type="string" calcext:value-type="string">
            <text:p>7 – Geschwindigkeit schne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EXT([.A286];&quot;000&quot;) &amp; &quot;.mp3&quot;" office:value-type="string" office:string-value="285.mp3" calcext:value-type="string">
            <text:p>285.mp3</text:p>
          </table:table-cell>
          <table:table-cell table:number-columns-repeated="2" office:value-type="string" calcext:value-type="string">
            <text:p>Admin-Menü beende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EXT([.A287];&quot;000&quot;) &amp; &quot;.mp3&quot;" office:value-type="string" office:string-value="286.mp3" calcext:value-type="string">
            <text:p>286.mp3</text:p>
          </table:table-cell>
          <table:table-cell table:number-columns-repeated="2" office:value-type="string" calcext:value-type="string">
            <text:p>Ende-Täg zum Beende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EXT([.A288];&quot;000&quot;) &amp; &quot;.mp3&quot;" office:value-type="string" office:string-value="287.mp3" calcext:value-type="string">
            <text:p>287.mp3</text:p>
          </table:table-cell>
          <table:table-cell table:number-columns-repeated="2" office:value-type="string" calcext:value-type="string">
            <text:p>Alle Geschichten wurden archivi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EXT([.A289];&quot;000&quot;) &amp; &quot;.mp3&quot;" office:value-type="string" office:string-value="288.mp3" calcext:value-type="string">
            <text:p>288.mp3</text:p>
          </table:table-cell>
          <table:table-cell table:number-columns-repeated="2" office:value-type="string" calcext:value-type="string">
            <text:p>Figuren-Datenbank gelöscht. Ich starte jetzt neu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EXT([.A290];&quot;000&quot;) &amp; &quot;.mp3&quot;" office:value-type="string" office:string-value="289.mp3" calcext:value-type="string">
            <text:p>289.mp3</text:p>
          </table:table-cell>
          <table:table-cell table:number-columns-repeated="2" office:value-type="string" calcext:value-type="string">
            <text:p>Wifi nicht verbund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EXT([.A291];&quot;000&quot;) &amp; &quot;.mp3&quot;" office:value-type="string" office:string-value="290.mp3" calcext:value-type="string">
            <text:p>290.mp3</text:p>
          </table:table-cell>
          <table:table-cell table:number-columns-repeated="2" office:value-type="string" calcext:value-type="string">
            <text:p>Öffne zuerst mit der Zahlenkarte 1 die WiFi Konfigurati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EXT([.A292];&quot;000&quot;) &amp; &quot;.mp3&quot;" office:value-type="string" office:string-value="291.mp3" calcext:value-type="string">
            <text:p>291.mp3</text:p>
          </table:table-cell>
          <table:table-cell table:number-columns-repeated="2" office:value-type="string" calcext:value-type="string">
            <text:p>Aktualisierung wird gestartet. Dies kann einige Minuten dauern. Hoorch startet anschließend ne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EXT([.A293];&quot;000&quot;) &amp; &quot;.mp3&quot;" office:value-type="string" office:string-value="292.mp3" calcext:value-type="string">
            <text:p>292.mp3</text:p>
          </table:table-cell>
          <table:table-cell table:number-columns-repeated="2" office:value-type="string" calcext:value-type="string">
            <text:p>Aktualisierung beendet. Ich starte jetzt ne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EXT([.A294];&quot;000&quot;) &amp; &quot;.mp3&quot;" office:value-type="string" office:string-value="293.mp3" calcext:value-type="string">
            <text:p>293.mp3</text:p>
          </table:table-cell>
          <table:table-cell table:number-columns-repeated="2" office:value-type="string" calcext:value-type="string">
            <text:p>Wifi ist ausgeschalt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EXT([.A295];&quot;000&quot;) &amp; &quot;.mp3&quot;" office:value-type="string" office:string-value="294.mp3" calcext:value-type="string">
            <text:p>294.mp3</text:p>
          </table:table-cell>
          <table:table-cell table:number-columns-repeated="2" office:value-type="string" calcext:value-type="string">
            <text:p>Die IP-Adresse laute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TEXT([.A296];&quot;000&quot;) &amp; &quot;.mp3&quot;" office:value-type="string" office:string-value="295.mp3" calcext:value-type="string">
            <text:p>295.mp3</text:p>
          </table:table-cell>
          <table:table-cell table:number-columns-repeated="2" office:value-type="string" calcext:value-type="string">
            <text:p>Verwenden Sie die Zahlenkarten um Einstellungen vorzunehme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TEXT([.A297];&quot;000&quot;) &amp; &quot;.mp3&quot;" office:value-type="string" office:string-value="296.mp3" calcext:value-type="string">
            <text:p>296.mp3</text:p>
          </table:table-cell>
          <table:table-cell table:number-columns-repeated="2" office:value-type="string" calcext:value-type="string">
            <text:p>Geschwindigkeit gesetz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09:17:44.8950645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5-13T09:18:18.931696261</dc:date>
    <meta:editing-duration>PT4H46M4S</meta:editing-duration>
    <meta:editing-cycles>43</meta:editing-cycles>
    <meta:generator>LibreOffice/26.2.3.2$Linux_X86_64 LibreOffice_project/620$Build-2</meta:generator>
    <meta:document-statistic meta:table-count="1" meta:cell-count="1188" meta:object-count="0"/>
    <meta:user-defined meta:name="ProgId">Excel.Sheet</meta:user-defined>
  </office:meta>
</office:document-meta>
</file>